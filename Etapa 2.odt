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8000002A01222BC52.png" manifest:media-type="image/png"/>
  <manifest:file-entry manifest:full-path="Pictures/1012D17E00007B3D00006F5043138D15.svg" manifest:media-type="image/svg+xml"/>
  <manifest:file-entry manifest:full-path="Pictures/100000010000038E00000225A2FDB126.png" manifest:media-type="image/png"/>
  <manifest:file-entry manifest:full-path="Pictures/1000F17900009B5700005DBE01B32FCE.svg" manifest:media-type="image/svg+xml"/>
  <manifest:file-entry manifest:full-path="Pictures/100000010000016E0000006F7132F3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2993in" table:align="left" style:writing-mode="lr-tb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8625in"/>
    </style:style>
    <style:style style:name="Table1.D" style:family="table-column">
      <style:table-column-properties style:column-width="2.4215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04bbf5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 New Roman" style:font-name-complex="Times New Roman1" style:text-scale="102%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weight="bold" officeooo:rsid="0004bbf5" style:font-weight-asian="bold" style:font-name-complex="Times New Roman1" style:font-weight-complex="bold" style:text-scale="102%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bold" officeooo:rsid="0006b3f6" officeooo:paragraph-rsid="0006b3f6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" fo:language="en" fo:country="US" fo:font-style="italic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en" fo:country="US" fo:font-style="italic" style:font-style-asian="italic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style:font-name="Times New Roman" fo:font-size="12pt" officeooo:paragraph-rsid="000d27c5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officeooo:paragraph-rsid="000706fc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rsid="000706fc" officeooo:paragraph-rsid="000706fc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style:font-name="Times New Roman" fo:font-size="12pt" fo:font-weight="bold" officeooo:rsid="000e1631" officeooo:paragraph-rsid="000e163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0e1631" officeooo:paragraph-rsid="000e1631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officeooo:paragraph-rsid="0011add8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officeooo:paragraph-rsid="0013450e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0f94ce" officeooo:paragraph-rsid="000e1631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style:font-name="Times New Roman" fo:font-size="12pt" fo:font-weight="bold" officeooo:rsid="000f94ce" officeooo:paragraph-rsid="000f94ce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bold" officeooo:rsid="000f94ce" officeooo:paragraph-rsid="000f94ce" style:font-size-asian="12pt" style:font-weight-asian="bold" style:font-name-complex="Times New Roman1" style:font-size-complex="12pt" style:font-weight-complex="bold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fo:font-style="italic" fo:font-weight="bold"/>
    </style:style>
    <style:style style:name="P29" style:family="paragraph" style:parent-style-name="Table_20_Contents">
      <style:paragraph-properties fo:margin-left="0in" fo:margin-right="0in" fo:text-indent="0in" style:auto-text-indent="false"/>
      <style:text-properties fo:font-weight="bold"/>
    </style:style>
    <style:style style:name="P30" style:family="paragraph" style:parent-style-name="Table_20_Contents">
      <style:paragraph-properties fo:margin-left="0in" fo:margin-right="0in" fo:text-indent="0in" style:auto-text-indent="false"/>
    </style:style>
    <style:style style:name="T1" style:family="text">
      <style:text-properties fo:font-family="Arial" style:font-family-generic="roman" style:font-pitch="variable" fo:font-size="12pt" fo:font-weight="bold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2" style:family="text">
      <style:text-properties fo:font-family="Arial" style:font-family-generic="roman" style:font-pitch="variable" fo:font-size="12pt" fo:font-weight="bold" officeooo:rsid="0004bbf5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3" style:family="text">
      <style:text-properties style:font-name="Times New Roman" fo:font-size="16pt" fo:font-weight="bold" officeooo:rsid="0004bbf5" style:font-size-asian="16pt" style:font-weight-asian="bold" style:font-name-complex="Times New Roman1" style:font-size-complex="16pt"/>
    </style:style>
    <style:style style:name="T4" style:family="text">
      <style:text-properties style:use-window-font-color="true" loext:opacity="0%" style:font-name="Times New Roman" fo:font-size="16pt" fo:language="pt" fo:country="BR" fo:font-weight="bold" officeooo:rsid="0004bbf5" style:letter-kerning="false" style:font-size-asian="16pt" style:language-asian="pt" style:country-asian="BR" style:font-weight-asian="bold" style:font-name-complex="Times New Roman1" style:font-size-complex="16pt" style:language-complex="ar" style:country-complex="SA"/>
    </style:style>
    <style:style style:name="T5" style:family="text">
      <style:text-properties style:use-window-font-color="true" loext:opacity="0%" style:font-name-asian="Calibri1" style:font-size-complex="10pt"/>
    </style:style>
    <style:style style:name="T6" style:family="text">
      <style:text-properties officeooo:rsid="000d27c5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use-window-font-color="true" loext:opacity="0%" style:font-name="Times New Roman" fo:font-size="12pt" fo:language="pt" fo:country="BR" fo:font-weight="bold" officeooo:rsid="000706fc" style:letter-kerning="false" style:font-size-asian="12pt" style:language-asian="pt" style:country-asian="BR" style:font-weight-asian="bold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use-window-font-color="true" loext:opacity="0%" style:font-name="Times New Roman" fo:font-size="12pt" fo:language="pt" fo:country="BR" fo:font-weight="bold" style:letter-kerning="false" style:font-size-asian="12pt" style:language-asian="pt" style:country-asian="BR" style:font-weight-asian="bold" style:font-name-complex="Times New Roman1" style:font-size-complex="12pt" style:language-complex="ar" style:country-complex="SA" style:font-weight-complex="bold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a3734" style:font-size-asian="12pt" style:font-name-complex="Times New Roman1" style:font-size-complex="12pt"/>
    </style:style>
    <style:style style:name="T13" style:family="text">
      <style:text-properties officeooo:rsid="0011add8"/>
    </style:style>
    <style:style style:name="T14" style:family="text">
      <style:text-properties officeooo:rsid="0013450e"/>
    </style:style>
    <style:style style:name="T15" style:family="text">
      <style:text-properties officeooo:rsid="000ffc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RSO SUPERIOR DE TECNOLOGIA EM </text:span><text:span text:style-name="T2">BANCO DE DADOS</text:span></text:p>
      <text:p text:style-name="P2"/>
      <text:p text:style-name="P3"><text:span text:style-name="T3">Definiç</text:span><text:span text:style-name="T4">ões do Projeto</text:span></text:p>
      <text:p text:style-name="P4"/>
      <text:p text:style-name="P5">ENRIQUE DE ANDRADE CASTRO, HEITOR HENRIQUE GUTIERRES</text:p>
      <text:p text:style-name="P6"/>
      <text:p text:style-name="P7">Tema</text:p>
      <text:p text:style-name="P8"/>
      <text:p text:style-name="P9"><text:span text:style-name="resumo_20_Char"><text:span text:style-name="T5">Arquitetura de Dados para Otimização de Processos e Rastreabilidade de Componentes em Centros Automotivos.</text:span></text:span></text:p>
      <text:p text:style-name="P10"/>
      <text:p text:style-name="P11"/>
      <text:p text:style-name="P12"/>
      <text:p text:style-name="P13">1 INTRODUÇÃO</text:p>
      <text:p text:style-name="P13"/>
      <text:p text:style-name="P14">O setor de manutenção automotiva lida hoje com veículos de alta complexidade tecnológica, compostos por milhares de componentes específicos. Atualmente, muitas oficinas gerenciam seus estoques e ordens de serviço de forma empírica ou através de descrições genéricas feitas manualmente pelos técnicos, o que gera falta de padronização e dificulta o controle de custos e a transparência para o cliente. Esta ausência de uma estrutura de dados rígida resulta em erros de inventário e perda de histórico de manutenção.</text:p>
      <text:p text:style-name="P14">Para sanar essas lacunas, o projeto propõe o desenvolvimento de uma modelagem de banco de dados relacional. O sistema visa integrar o cadastro de componentes complexos (como especificações de motores e transmissões), gestão de fornecedores e o fluxo de ordens de serviço. Esta estrutura servirá como <text:span text:style-name="T6">um apoio</text:span> para uma futura implementação de um sistema ERP, garantindo integridade das informações e suporte à tomada de decisão. </text:p>
      <text:p text:style-name="P13"/>
      <text:p text:style-name="P9"><text:span text:style-name="T7">2 </text:span><text:span text:style-name="T8">JUSTIFICATIVA</text:span></text:p>
      <text:p text:style-name="P15"/>
      <text:p text:style-name="P16"><text:tab/>Um carro moderno é composto por diversos componentes diferentes e especializados que trabalham de forma quase independente um de outro. São milhares de partes e cada uma possui sua própria tecnologia e profissionais especializados. Organizar estas informações de forma a trazer clareza é um desafio para qualquer oficina mecânica, e traz diversos benefícios para tanto a oficina quanto para os clientes. O principal benefício é a geração de dados para ajudar na inteligência do negócio, auxiliando os gestores a analisarem os pontos fortes e fracos do negócio para melhor atender o público alvo.</text:p>
      <text:p text:style-name="P15"/>
      <text:p text:style-name="P17"><text:span text:style-name="T9">3 M</text:span><text:span text:style-name="T10">ÉTODOS E FERRAMENTAS DE APOIO</text:span></text:p>
      <text:p text:style-name="P18"/>
      <text:p text:style-name="P19"><text:span text:style-name="T11">O banco de dados será hospedado em um ambiente isolado utilizando Distrobox com imagem Debian GNU/Linux, garantindo portabilidade e estabilidade para o PostgreSQL 16. A modelagem lógic</text:span><text:span text:style-name="T12">a</text:span><text:span text:style-name="T11">será elaborada via dbdiagram.io utilizando a sintaxe DBML, e a documentação final seguirá o padrão normativo da instituição através do LibreOffice Writer.</text:span></text:p>
      <text:p text:style-name="P18"/>
      <text:p text:style-name="P20"/>
      <text:p text:style-name="P21">4. MODELO CONCEITUAL</text:p>
      <text:p text:style-name="P22"/>
      <text:p text:style-name="P23"><text:tab/><text:span text:style-name="T13">A seguinte figura mostra o diagrama do modelo conceitual do banco de dados desenvolvido. Foi utilizado o modelo de entidade-relacionamento para representar a cardinalidade das entidades.</text:span></text:p>
      <text:p text:style-name="P22"/>
      <text:p text:style-name="P22"><draw:frame draw:style-name="fr1" draw:name="Image1" text:anchor-type="char" svg:width="6.2992in" svg:height="3.8008in" draw:z-index="4"><draw:image xlink:href="Pictures/1000F17900009B5700005DBE01B32FCE.svg" xlink:type="simple" xlink:show="embed" xlink:actuate="onLoad" draw:mime-type="image/svg+xml"/><draw:image xlink:href="Pictures/100000010000038E00000225A2FDB126.png" xlink:type="simple" xlink:show="embed" xlink:actuate="onLoad" draw:mime-type="image/png"/></draw:frame></text:p>
      <text:p text:style-name="P22"/>
      <text:p text:style-name="P21">5. MODELO LÓGICO</text:p>
      <text:p text:style-name="P22"/>
      <text:p text:style-name="P24"><text:tab/><text:span text:style-name="T13">A </text:span><text:span text:style-name="T14">figura a seguir ilustra o modelo lógico do banco de dados sendo desenvolvido. São ilustradas as estruturas como: tabelas, tipos de dados, chaves primárias e chaves estrangeiras, bem como o relacionamento entre as tabelas.</text:span></text:p>
      <text:p text:style-name="P22"><draw:frame draw:style-name="fr2" draw:name="Image2" text:anchor-type="char" svg:x="-0.1992in" svg:y="0.1543in" svg:width="6.2992in" svg:height="5.6898in" draw:z-index="5"><draw:image xlink:href="Pictures/1012D17E00007B3D00006F5043138D15.svg" xlink:type="simple" xlink:show="embed" xlink:actuate="onLoad" draw:mime-type="image/svg+xml"/><draw:image xlink:href="Pictures/10000001000002E8000002A01222BC52.png" xlink:type="simple" xlink:show="embed" xlink:actuate="onLoad" draw:mime-type="image/png"/></draw:frame></text:p>
      <text:p text:style-name="P25"/>
      <text:p text:style-name="P26">6. DICIONÁRIO DE DADOS</text:p>
      <text:p text:style-name="P27"/>
      <text:p text:style-name="P18">Segue um exemplo do dicionário de dados da tabela Fornecedor, <text:span text:style-name="T15">com cada campo descrito, bem como o tipo de dado, restrições que este possui e sua descrição. O dicionário de dados de forma completa pode ser encontrado no Github: https://github.com/Enriq4472/proj_bd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Fornecedor</text:p>
          </table:table-cell>
          <table:table-cell table:style-name="Table1.A1" office:value-type="string">
            <text:p text:style-name="P29">tipo de dado</text:p>
          </table:table-cell>
          <table:table-cell table:style-name="Table1.A1" office:value-type="string">
            <text:p text:style-name="P29">restrições</text:p>
          </table:table-cell>
          <table:table-cell table:style-name="Table1.A1" office:value-type="string">
            <text:p text:style-name="P29">descrição</text:p>
          </table:table-cell>
        </table:table-row>
        <table:table-row>
          <table:table-cell table:style-name="Table1.A1" office:value-type="string">
            <text:p text:style-name="P30">id_fornecedor</text:p>
          </table:table-cell>
          <table:table-cell table:style-name="Table1.A1" office:value-type="string">
            <text:p text:style-name="P30">INT primary key</text:p>
          </table:table-cell>
          <table:table-cell table:style-name="Table1.A1" office:value-type="string">
            <text:p text:style-name="P30">Não pode ser nulo e deve ser único</text:p>
          </table:table-cell>
          <table:table-cell table:style-name="Table1.A1" office:value-type="string">
            <text:p text:style-name="P30">Identificar os fornecedores com um código</text:p>
          </table:table-cell>
        </table:table-row>
        <table:table-row>
          <table:table-cell table:style-name="Table1.A1" office:value-type="string">
            <text:p text:style-name="P30">nome</text:p>
          </table:table-cell>
          <table:table-cell table:style-name="Table1.A1" office:value-type="string">
            <text:p text:style-name="P30">VARCHAR(150)</text:p>
          </table:table-cell>
          <table:table-cell table:style-name="Table1.A1" office:value-type="string">
            <text:p text:style-name="P30">Não pode ser nulo</text:p>
          </table:table-cell>
          <table:table-cell table:style-name="Table1.A1" office:value-type="string">
            <text:p text:style-name="P30">Identificar o nome do fornecedor</text:p>
          </table:table-cell>
        </table:table-row>
        <table:table-row>
          <table:table-cell table:style-name="Table1.A1" office:value-type="string">
            <text:p text:style-name="P30">cep</text:p>
          </table:table-cell>
          <table:table-cell table:style-name="Table1.A1" office:value-type="string">
            <text:p text:style-name="P30">CHAR(8)</text:p>
          </table:table-cell>
          <table:table-cell table:style-name="Table1.A1" office:value-type="string">
            <text:p text:style-name="P30">Não pode ser nulo</text:p>
          </table:table-cell>
          <table:table-cell table:style-name="Table1.A1" office:value-type="string">
            <text:p text:style-name="P30">Identifica o codigo postal</text:p>
          </table:table-cell>
        </table:table-row>
        <table:table-row>
          <table:table-cell table:style-name="Table1.A1" office:value-type="string">
            <text:p text:style-name="P30">telefone</text:p>
          </table:table-cell>
          <table:table-cell table:style-name="Table1.A1" office:value-type="string">
            <text:p text:style-name="P30">VARCHAR(20)</text:p>
          </table:table-cell>
          <table:table-cell table:style-name="Table1.A1" office:value-type="string">
            <text:p text:style-name="P30">Opcional caso o website tenha sido preenchido</text:p>
          </table:table-cell>
          <table:table-cell table:style-name="Table1.A1" office:value-type="string">
            <text:p text:style-name="P30">Identifica o telefone do local</text:p>
          </table:table-cell>
        </table:table-row>
        <table:table-row>
          <table:table-cell table:style-name="Table1.A1" office:value-type="string">
            <text:p text:style-name="P30">website</text:p>
          </table:table-cell>
          <table:table-cell table:style-name="Table1.A1" office:value-type="string">
            <text:p text:style-name="P30">VARCHAR(255)</text:p>
          </table:table-cell>
          <table:table-cell table:style-name="Table1.A1" office:value-type="string">
            <text:p text:style-name="P30">Opcional caso o telefone tenha sido preenchido</text:p>
          </table:table-cell>
          <table:table-cell table:style-name="Table1.A1" office:value-type="string">
            <text:p text:style-name="Table_20_Contents">Identifica o website do local</text:p>
          </table:table-cell>
        </table:table-row>
      </table:table>
      <text:p text:style-name="P27"/>
      <text:p text:style-name="P27"><text:a xlink:type="simple" xlink:href="https://docs.google.com/spreadsheets/d/1JvuSG1lS_ugT3VIauIP9TCFftmJqbYwqkfwXl5sZibo/edit?usp=sharing" text:style-name="Internet_20_link" text:visited-style-name="Visited_20_Internet_20_Link"/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DejaVu Sans" style:font-family-asian="'DejaVu Sans'" style:font-family-generic-asian="system" style:font-pitch-asian="variable" style:font-size-asian="11pt" style:language-asian="pt" style:country-asian="BR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resumo" style:family="paragraph" loext:linked-style-name="resumo_20_Char" style:auto-update="true">
      <style:paragraph-properties fo:margin-top="0in" fo:margin-bottom="0in" style:contextual-spacing="false" fo:line-height="200%" fo:text-align="justify" style:justify-single-word="false" fo:orphans="0" fo:widows="0" fo:hyphenation-ladder-count="no-limit" fo:hyphenation-keep="auto" loext:hyphenation-keep-type="column" loext:hyphenation-keep-line="false" style:writing-mode="lr-tb"/>
      <style:text-properties fo:color="#595959" loext:opacity="100%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sumo_20_-_20_Abstrac" style:display-name="Resumo - Abstrac" style:family="paragraph" style:parent-style-name="Standard" loext:linked-style-name="Resumo_20_-_20_Abstrac_20_Char" style:auto-update="true">
      <style:paragraph-properties fo:margin-left="0in" fo:margin-right="0in" fo:margin-top="0.0835in" fo:margin-bottom="0.0835in" style:contextual-spacing="true" fo:line-height="150%" fo:text-align="justify" style:justify-single-word="false" fo:text-indent="0.1972in" style:auto-text-indent="false">
        <style:tab-stops>
          <style:tab-stop style:position="0.4925in"/>
        </style:tab-stops>
      </style:paragraph-properties>
      <style:text-properties fo:color="#0d0d0d" loext:opacity="100%"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/>
    </style:style>
    <style:style style:name="Marcadores" style:family="paragraph" style:next-style-name="Standard" style:list-style-name="WWNum1" style:list-level="1">
      <style:paragraph-properties fo:margin-left="0.248in" fo:margin-right="0in" fo:margin-top="0.1665in" fo:margin-bottom="0.1665in" style:contextual-spacing="true" fo:line-height="150%" fo:text-align="justify" style:justify-single-word="false" fo:orphans="2" fo:widows="2" fo:hyphenation-ladder-count="no-limit" fo:hyphenation-keep="auto" loext:hyphenation-keep-type="column" loext:hyphenation-keep-line="false" fo:text-indent="-0.248in" style:auto-text-indent="false" style:writing-mode="lr-tb"/>
      <style:text-properties fo:color="#262626" loext:opacity="100%" style:font-name="Times New Roman" fo:font-family="'Times New Roman'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loext:linked-style-name="Texto_20_de_20_nota_20_de_20_fim_20_Char" style:class="extra">
      <style:paragraph-properties fo:margin-top="0in" fo:margin-bottom="0in" style:contextual-spacing="true" fo:line-height="100%" fo:text-align="justify" style:justify-single-word="false">
        <style:tab-stops>
          <style:tab-stop style:position="0.4925in"/>
        </style:tab-stops>
      </style:paragraph-properties>
      <style:text-properties fo:color="#262626" loext:opacity="100%"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Texto_5f_XVIII_5f_ENANCIB" style:display-name="Texto_XVIII_ENANCIB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2pt" fo:letter-spacing="-0.0016in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Lista_5f_Referências_5f_XVIII_5f_ENANCIB" style:display-name="Lista_Referências_XVIII_ENANCIB" style:family="paragraph" style:parent-style-name="Standard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12pt" fo:letter-spacing="-0.0016in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ontes" style:family="paragraph" style:parent-style-name="Standard">
      <style:paragraph-properties fo:margin-top="0.1665in" fo:margin-bottom="0.1665in" style:contextual-spacing="true" fo:line-height="150%" fo:text-align="justify" style:justify-single-word="false">
        <style:tab-stops>
          <style:tab-stop style:position="0.4925in"/>
        </style:tab-stops>
      </style:paragraph-properties>
      <style:text-properties fo:color="#262626" loext:opacity="100%" style:font-name="Times New Roman" fo:font-family="'Times New Roman'" style:font-family-generic="roman" style:font-pitch="variable" fo:language="en" fo:country="US" style:font-name-asian="Calibri1" style:font-family-asian="Calibri" style:font-family-generic-asian="system" style:font-pitch-asian="variable" style:font-name-complex="Times" style:font-family-complex="Times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ela_5f_XVIII_5f_ENANCIB" style:display-name="Tabela_XVIII_ENANCIB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0pt" fo:letter-spacing="-0.0016in" fo:font-weight="bold" style:font-name-asian="Times New Roman1" style:font-family-asian="'Times New Roman'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/>
    </style:style>
    <style:style style:name="Título_5f_Tabela_5f_XVIII_5f_ENANCIB" style:display-name="Título_Tabela_XVIII_ENANCIB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name-asian="Times New Roman1" style:font-family-asian="'Times New Roman'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Fonte_5f_XVIII_5f_ENANCIB" style:display-name="Fonte_XVIII_ENANCIB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annotation_20_text" style:display-name="annotation text" style:family="paragraph" style:parent-style-name="Standard" loext:linked-style-name="Texto_20_de_20_comentário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resumo_20_Char" style:display-name="resumo Char" style:family="text" loext:linked-style-name="resumo">
      <style:text-properties fo:color="#595959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language-complex="en" style:country-complex="US"/>
    </style:style>
    <style:style style:name="Resumo_20_-_20_Abstrac_20_Char" style:display-name="Resumo - Abstrac Char" style:family="text" loext:linked-style-name="Resumo_20_-_20_Abstrac">
      <style:text-properties fo:color="#0d0d0d" loext:opacity="100%"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/>
    </style:style>
    <style:style style:name="Texto_20_de_20_nota_20_de_20_fim_20_Char" style:display-name="Texto de nota de fim Char" style:family="text" style:parent-style-name="Default_20_Paragraph_20_Font">
      <style:text-properties fo:color="#262626" loext:opacity="100%"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enção_20_Pendente1" style:display-name="Menção Pendente1" style:family="text" style:parent-style-name="Default_20_Paragraph_20_Font">
      <style:text-properties fo:color="#605e5c" loext:opacity="100%" fo:background-color="#e1dfdd"/>
    </style:style>
    <style:style style:name="Menção_20_Pendente2" style:display-name="Menção Pendente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862in" fo:margin-left="0.736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.2189in"/>
          <style:tab-stop style:position="1.7083in"/>
          <style:tab-stop style:position="2.9528in" style:type="center"/>
          <style:tab-stop style:position="3.3465in" style:type="center"/>
          <style:tab-stop style:position="5.9055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margin-top="0in" fo:margin-bottom="0.139in" style:contextual-spacing="false" fo:text-align="center" style:justify-single-word="false">
        <style:tab-stops>
          <style:tab-stop style:position="2.4583in"/>
        </style:tab-stops>
      </style:paragraph-properties>
    </style:style>
    <style:style style:name="MT1" style:family="text">
      <style:text-properties fo:color="#880e1b" loext:opacity="100%" fo:font-family="Verdana" style:font-family-generic="roman" style:font-pitch="variable" fo:font-weight="bold" style:font-weight-asian="bold"/>
    </style:style>
    <style:style style:name="MT2" style:family="text">
      <style:text-properties fo:color="#880e1b" loext:opacity="100%" fo:font-family="Arial" style:font-family-generic="roman" style:font-pitch="variable" fo:font-size="12pt" fo:font-weight="bold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65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3937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y="0.0008in" svg:width="4.3799in" svg:height="1.2634in" draw:z-index="3"><draw:image xlink:href="Pictures/100000010000016E0000006F7132F321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_______________________________________________________________________________________________</text:p>
        <text:p text:style-name="MP3"><text:span text:style-name="MT1">Faculdade de Tecnologia</text:span><text:span text:style-name="MT2"> de Bauru</text:span></text:p>
      </style:header>
    </style:master-page>
    <style:master-page style:name="Converted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5-17T01:02:00</meta:creation-date>
    <meta:initial-creator>Alunos</meta:initial-creator>
    <dc:language>pt-BR</dc:language>
    <dc:date>2026-04-09T21:16:29.850012383</dc:date>
    <meta:editing-cycles>19</meta:editing-cycles>
    <meta:editing-duration>PT2H29M3S</meta:editing-duration>
    <meta:generator>LibreOffice/25.8.5.2$Linux_X86_64 LibreOffice_project/580$Build-2</meta:generator>
    <meta:document-statistic meta:table-count="1" meta:image-count="3" meta:object-count="0" meta:page-count="4" meta:paragraph-count="44" meta:word-count="518" meta:character-count="3474" meta:non-whitespace-character-count="2996"/>
    <meta:user-defined meta:name="AppVersion">15.0000</meta:user-defined>
    <meta:user-defined meta:name="Company">Microsoft</meta:user-defined>
    <meta:template xlink:type="simple" xlink:actuate="onRequest" xlink:title="Normal" xlink:href=""/>
  </office:meta>
</office:document-meta>
</file>